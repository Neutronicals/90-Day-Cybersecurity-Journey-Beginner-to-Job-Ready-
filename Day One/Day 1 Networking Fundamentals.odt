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5.2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4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4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3.5583in"/>
    </style:style>
    <style:style style:name="Table2.C" style:family="table-column">
      <style:table-column-properties style:column-width="2.3667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Heading_20_1">
      <style:text-properties officeooo:rsid="00108ca8" officeooo:paragraph-rsid="00108ca8"/>
    </style:style>
    <style:style style:name="P2" style:family="paragraph" style:parent-style-name="Text_20_body">
      <style:text-properties officeooo:rsid="00108ca8"/>
    </style:style>
    <style:style style:name="P3" style:family="paragraph" style:parent-style-name="Heading_20_2">
      <style:text-properties officeooo:rsid="00108ca8"/>
    </style:style>
    <style:style style:name="P4" style:family="paragraph" style:parent-style-name="Text_20_body">
      <style:text-properties fo:font-weight="bold" officeooo:rsid="00108ca8"/>
    </style:style>
    <style:style style:name="P5" style:family="paragraph" style:parent-style-name="Heading_20_3">
      <style:text-properties officeooo:rsid="00108ca8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rsid="00108ca8"/>
    </style:style>
    <style:style style:name="P7" style:family="paragraph" style:parent-style-name="Text_20_body" style:list-style-name="L1">
      <style:text-properties officeooo:rsid="00108ca8"/>
    </style:style>
    <style:style style:name="P8" style:family="paragraph" style:parent-style-name="Table_20_Contents">
      <style:paragraph-properties fo:margin-top="0in" fo:margin-bottom="0.1965in" style:contextual-spacing="false"/>
      <style:text-properties officeooo:rsid="00108ca8"/>
    </style:style>
    <style:style style:name="P9" style:family="paragraph" style:parent-style-name="Table_20_Contents">
      <style:paragraph-properties fo:margin-top="0in" fo:margin-bottom="0.1965in" style:contextual-spacing="false"/>
      <style:text-properties fo:font-weight="bold" officeooo:rsid="00108ca8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officeooo:rsid="00108ca8"/>
    </style:style>
    <style:style style:name="P11" style:family="paragraph" style:parent-style-name="Text_20_body" style:list-style-name="L2">
      <style:text-properties officeooo:rsid="00108ca8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officeooo:rsid="00108ca8"/>
    </style:style>
    <style:style style:name="P13" style:family="paragraph" style:parent-style-name="Text_20_body" style:list-style-name="L3">
      <style:text-properties officeooo:rsid="00108ca8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rsid="00108ca8"/>
    </style:style>
    <style:style style:name="P15" style:family="paragraph" style:parent-style-name="Text_20_body" style:list-style-name="L4">
      <style:text-properties officeooo:rsid="00108ca8"/>
    </style:style>
    <style:style style:name="P16" style:family="paragraph" style:parent-style-name="Text_20_body" style:list-style-name="L5">
      <style:paragraph-properties fo:margin-top="0in" fo:margin-bottom="0in" style:contextual-spacing="false"/>
      <style:text-properties officeooo:rsid="00108ca8"/>
    </style:style>
    <style:style style:name="P17" style:family="paragraph" style:parent-style-name="Text_20_body" style:list-style-name="L5">
      <style:text-properties officeooo:rsid="00108ca8"/>
    </style:style>
    <style:style style:name="P18" style:family="paragraph" style:parent-style-name="Text_20_body" style:list-style-name="L6">
      <style:paragraph-properties fo:margin-top="0in" fo:margin-bottom="0in" style:contextual-spacing="false"/>
      <style:text-properties officeooo:rsid="00108ca8"/>
    </style:style>
    <style:style style:name="P19" style:family="paragraph" style:parent-style-name="Text_20_body" style:list-style-name="L6">
      <style:text-properties officeooo:rsid="00108ca8"/>
    </style:style>
    <style:style style:name="P20" style:family="paragraph" style:parent-style-name="Text_20_body" style:list-style-name="L7">
      <style:paragraph-properties fo:margin-top="0in" fo:margin-bottom="0in" style:contextual-spacing="false"/>
      <style:text-properties officeooo:rsid="00108ca8"/>
    </style:style>
    <style:style style:name="P21" style:family="paragraph" style:parent-style-name="Text_20_body" style:list-style-name="L7">
      <style:text-properties officeooo:rsid="00108ca8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officeooo:rsid="00108ca8"/>
    </style:style>
    <style:style style:name="P23" style:family="paragraph" style:parent-style-name="Text_20_body" style:list-style-name="L8">
      <style:text-properties officeooo:rsid="00108ca8"/>
    </style:style>
    <style:style style:name="P24" style:family="paragraph" style:parent-style-name="Text_20_body" style:list-style-name="L9">
      <style:paragraph-properties fo:margin-top="0in" fo:margin-bottom="0in" style:contextual-spacing="false"/>
      <style:text-properties officeooo:rsid="00108ca8"/>
    </style:style>
    <style:style style:name="P25" style:family="paragraph" style:parent-style-name="Text_20_body" style:list-style-name="L9">
      <style:text-properties officeooo:rsid="00108ca8"/>
    </style:style>
    <style:style style:name="P26" style:family="paragraph" style:parent-style-name="Text_20_body" style:list-style-name="L10">
      <style:paragraph-properties fo:margin-top="0in" fo:margin-bottom="0in" style:contextual-spacing="false"/>
      <style:text-properties officeooo:rsid="00108ca8"/>
    </style:style>
    <style:style style:name="P27" style:family="paragraph" style:parent-style-name="Text_20_body" style:list-style-name="L10">
      <style:text-properties officeooo:rsid="00108ca8"/>
    </style:style>
    <style:style style:name="P28" style:family="paragraph" style:parent-style-name="Text_20_body" style:list-style-name="L11">
      <style:paragraph-properties fo:margin-top="0in" fo:margin-bottom="0in" style:contextual-spacing="false"/>
      <style:text-properties officeooo:rsid="00108ca8"/>
    </style:style>
    <style:style style:name="P29" style:family="paragraph" style:parent-style-name="Text_20_body" style:list-style-name="L11">
      <style:text-properties officeooo:rsid="00108ca8"/>
    </style:style>
    <style:style style:name="P30" style:family="paragraph" style:parent-style-name="Standard">
      <style:text-properties officeooo:rsid="00108ca8" officeooo:paragraph-rsid="00108ca8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y 1: Encapsulation Mechanics Study Guide</text:h>
      <text:p text:style-name="P2">This study guide and practical lab manual covers the fundamental mechanics of data encapsulation, transport protocols, and system-level data organisation. This curriculum is designed to provide a deep dive into how data is structured, secured, and monitored as it moves through network interfaces and host filesystems.</text:p>
      <text:p text:style-name="P2">-------------------------------------------------------------------------------- </text:p>
      <text:h text:style-name="P3" text:outline-level="2">Module 1: The Socket Interface and Data Representation</text:h>
      <text:p text:style-name="P4">Duration: 1.5 Hours</text:p>
      <text:h text:style-name="P5" text:outline-level="3">1.1 Understanding Sockets as Endpoints</text:h>
      <text:p text:style-name="P2">A socket serves as the endpoint of a bidirectional communication flow between two applications. Sockets are the primary form of Inter-Process Communication (IPC) for cross-platform networking.</text:p>
      <text:list text:style-name="L1">
        <text:list-item>
          <text:p text:style-name="P6"><text:span text:style-name="T1">Client Sockets:</text:span> The endpoint for the initiating application (e.g. a web browser).</text:p>
        </text:list-item>
        <text:list-item>
          <text:p text:style-name="P6"><text:span text:style-name="T1">Server Sockets:</text:span> Acts as a "switchboard operator", listening for incoming connection requests and producing new client sockets to handle specific conversations.</text:p>
        </text:list-item>
        <text:list-item>
          <text:p text:style-name="P7"><text:span text:style-name="T1">AF_INET vs. Localhost:</text:span> Sockets using <text:span text:style-name="Source_20_Text">AF_INET</text:span> (IPv4) are visible to the outside world. Binding to <text:span text:style-name="Source_20_Text">localhost</text:span> or <text:span text:style-name="Source_20_Text">127.0.0.1</text:span> restricts visibility to the local machine, often bypassing layers of network code for faster performance.</text:p>
        </text:list-item>
      </text:list>
      <text:h text:style-name="P5" text:outline-level="3">1.2 Binary Data and Endianness</text:h>
      <text:p text:style-name="P2">Network communication requires a strict agreement on how bytes are ordered. Data encapsulation at the binary level must account for the differences between host architectures and network standard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ncept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9">Big-Endian (Network Byte Order)</text:p>
          </table:table-cell>
          <table:table-cell table:style-name="Table1.B2" office:value-type="string">
            <text:p text:style-name="P8">The most significant byte is stored first. A 16-bit integer value of "1" is represented as hex bytes <text:span text:style-name="Source_20_Text">00 01</text:span>.</text:p>
          </table:table-cell>
        </table:table-row>
        <table:table-row>
          <table:table-cell table:style-name="Table1.A2" office:value-type="string">
            <text:p text:style-name="P9">Little-Endian (Host Order)</text:p>
          </table:table-cell>
          <table:table-cell table:style-name="Table1.B2" office:value-type="string">
            <text:p text:style-name="P8">Used by most common processors (x86, ARM, RISC-V). The least significant byte is stored first. A 16-bit integer value of "1" is represented as <text:span text:style-name="Source_20_Text">01 00</text:span>.</text:p>
          </table:table-cell>
        </table:table-row>
        <table:table-row>
          <table:table-cell table:style-name="Table1.A4" office:value-type="string">
            <text:p text:style-name="P9">Conversion Functions</text:p>
          </table:table-cell>
          <table:table-cell table:style-name="Table1.B4" office:value-type="string">
            <text:p text:style-name="P8">Tools such as <text:span text:style-name="Source_20_Text">ntohl</text:span>, <text:span text:style-name="Source_20_Text">htonl</text:span>, <text:span text:style-name="Source_20_Text">ntohs</text:span>, and <text:span text:style-name="Source_20_Text">htons</text:span> are used to convert integers between network ("n") and host ("h") byte orders.</text:p>
          </table:table-cell>
        </table:table-row>
      </table:table>
      <text:h text:style-name="P5" text:outline-level="3"><text:soft-page-break/>1.3 Fixed-Length vs. Delimited Messages</text:h>
      <text:p text:style-name="P2">Because sockets do not have an inherent "End of Transfer" (EOT) marker, developers must choose an encapsulation strategy for messages:</text:p>
      <text:list text:style-name="L2">
        <text:list-item>
          <text:p text:style-name="P10"><text:span text:style-name="T1">Fixed Length:</text:span> Every message is the same size.</text:p>
        </text:list-item>
        <text:list-item>
          <text:p text:style-name="P10"><text:span text:style-name="T1">Delimited:</text:span> Messages end with a specific character (e.g., <text:span text:style-name="Source_20_Text">\n</text:span>).</text:p>
        </text:list-item>
        <text:list-item>
          <text:p text:style-name="P10"><text:span text:style-name="T1">Length Indicators:</text:span> The message is prefixed with its size (e.g., a 5-digit numeric header).</text:p>
        </text:list-item>
        <text:list-item>
          <text:p text:style-name="P11"><text:span text:style-name="T1">Shutdown-based:</text:span> The connection is closed after one transfer.</text:p>
        </text:list-item>
      </text:list>
      <text:p text:style-name="P2">-------------------------------------------------------------------------------- </text:p>
      <text:h text:style-name="P3" text:outline-level="2">Module 2: Encapsulation at the Transport Layer (TLS 1.3)</text:h>
      <text:p text:style-name="P4">Duration: 1.5 Hours</text:p>
      <text:h text:style-name="P5" text:outline-level="3">2.1 The Evolution of Transport Security</text:h>
      <text:p text:style-name="P2">Transport Layer Security (TLS) provides the machinery for HTTPS, ensuring communication is encrypted and authenticated. TLS 1.3 (RFC 8446) represents a major overhaul intended to fix flaws in TLS 1.2.</text:p>
      <text:h text:style-name="P5" text:outline-level="3">2.2 Header and Version Identification</text:h>
      <text:p text:style-name="P2">To maintain compatibility and prevent "ossification" by middleboxes, TLS 1.3 headers were engineered to mimic older versions on the wire.</text:p>
      <text:list text:style-name="L3">
        <text:list-item>
          <text:p text:style-name="P12"><text:span text:style-name="T1">TLS 1.2 Version Code:</text:span> <text:span text:style-name="Source_20_Text">0x0303</text:span>.</text:p>
        </text:list-item>
        <text:list-item>
          <text:p text:style-name="P13"><text:span text:style-name="T1">TLS 1.3 Version Code:</text:span> <text:span text:style-name="Source_20_Text">0x0304</text:span> (internally), though it may appear as <text:span text:style-name="Source_20_Text">0x0303</text:span> in certain handshake fields to ensure it passes through legacy equipment.</text:p>
        </text:list-item>
      </text:list>
      <text:h text:style-name="P5" text:outline-level="3">2.3 Key Exchange Mechanics</text:h>
      <text:p text:style-name="P2">TLS 1.3 restricts the types of key exchanges allowed to ensure "Forward Secrecy" (preventing future decryption if a private key is stolen).</text:p>
      <text:list text:style-name="L4">
        <text:list-item>
          <text:p text:style-name="P14"><text:span text:style-name="T1">RSA Key Exchange (Removed):</text:span> The client encrypts a secret with the server's public key. Vulnerable to "million-message attacks" (Bleichenbacher attacks) like ROBOT.</text:p>
        </text:list-item>
        <text:list-item>
          <text:p text:style-name="P15"><text:span text:style-name="T1">Diffie-Hellman Key Agreement:</text:span> Both parties exchange public key shares to derive a shared secret. TLS 1.3 permits only "ephemeral" Diffie-Hellman using "named groups" (pre-approved secure parameters like X25519 or P-256).</text:p>
        </text:list-item>
      </text:list>
      <text:h text:style-name="P5" text:outline-level="3">2.4 Performance Optimisation: 1-RTT and 0-RTT</text:h>
      <text:list text:style-name="L5">
        <text:list-item>
          <text:p text:style-name="P16"><text:span text:style-name="T1">1-RTT Mode:</text:span> In TLS 1.3, the handshake latency is reduced to one round-trip. The client sends Diffie-Hellman key shares in the very first message.</text:p>
        </text:list-item>
        <text:list-item>
          <text:p text:style-name="P16"><text:span text:style-name="T1">0-RTT Resumption:</text:span> Utilizing Pre-Shared Keys (PSK), a client can send encrypted data in the first message to the server.</text:p>
          <text:list>
            <text:list-item>
              <text:p text:style-name="P17"><text:soft-page-break/><text:span text:style-name="T1">Security Risk:</text:span> 0-RTT is vulnerable to <text:span text:style-name="T1">Replay Attacks</text:span>. Attackers can capture and re-send these packets. Servers mitigate this by rejecting non-idempotent (state-changing) requests in 0-RTT data.</text:p>
            </text:list-item>
          </text:list>
        </text:list-item>
      </text:list>
      <text:p text:style-name="P2">-------------------------------------------------------------------------------- </text:p>
      <text:h text:style-name="P3" text:outline-level="2">Module 3: Host-Level Data Organisation (FHS)</text:h>
      <text:p text:style-name="P4">Duration: 1.5 Hours</text:p>
      <text:h text:style-name="P5" text:outline-level="3">3.1 The Filesystem Hierarchy Standard (FHS)</text:h>
      <text:p text:style-name="P2">Encapsulation isn't just for packets; it also applies to how data is isolated within a host operating system. The FHS classifies files to ensure software can predict where specific data resides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Classification</text:p>
          </table:table-cell>
          <table:table-cell table:style-name="Table2.B1" office:value-type="string">
            <text:p text:style-name="P8">Definition</text:p>
          </table:table-cell>
          <table:table-cell table:style-name="Table2.B1" office:value-type="string">
            <text:p text:style-name="P8">Examples</text:p>
          </table:table-cell>
        </table:table-row>
        <table:table-row>
          <table:table-cell table:style-name="Table2.A2" office:value-type="string">
            <text:p text:style-name="P9">Shareable</text:p>
          </table:table-cell>
          <table:table-cell table:style-name="Table2.B2" office:value-type="string">
            <text:p text:style-name="P8">Files that can be stored on one host and used by others.</text:p>
          </table:table-cell>
          <table:table-cell table:style-name="Table2.B2" office:value-type="string">
            <text:p text:style-name="P8"><text:span text:style-name="Source_20_Text">/usr/share/doc</text:span>, <text:span text:style-name="Source_20_Text">/usr/lib</text:span></text:p>
          </table:table-cell>
        </table:table-row>
        <table:table-row>
          <table:table-cell table:style-name="Table2.A2" office:value-type="string">
            <text:p text:style-name="P9">Unshareable</text:p>
          </table:table-cell>
          <table:table-cell table:style-name="Table2.B2" office:value-type="string">
            <text:p text:style-name="P8">Specific to a single system.</text:p>
          </table:table-cell>
          <table:table-cell table:style-name="Table2.B2" office:value-type="string">
            <text:p text:style-name="P8"><text:span text:style-name="Source_20_Text">/etc</text:span>, <text:span text:style-name="Source_20_Text">/home</text:span></text:p>
          </table:table-cell>
        </table:table-row>
        <table:table-row>
          <table:table-cell table:style-name="Table2.A2" office:value-type="string">
            <text:p text:style-name="P9">Static</text:p>
          </table:table-cell>
          <table:table-cell table:style-name="Table2.B2" office:value-type="string">
            <text:p text:style-name="P8">Files that do not change without admin intervention.</text:p>
          </table:table-cell>
          <table:table-cell table:style-name="Table2.B2" office:value-type="string">
            <text:p text:style-name="P8">Binaries in <text:span text:style-name="Source_20_Text">/usr/bin</text:span></text:p>
          </table:table-cell>
        </table:table-row>
        <table:table-row>
          <table:table-cell table:style-name="Table2.A5" office:value-type="string">
            <text:p text:style-name="P9">Variable</text:p>
          </table:table-cell>
          <table:table-cell table:style-name="Table2.B5" office:value-type="string">
            <text:p text:style-name="P8">Files that change during normal operation.</text:p>
          </table:table-cell>
          <table:table-cell table:style-name="Table2.B5" office:value-type="string">
            <text:p text:style-name="P8">Logs in <text:span text:style-name="Source_20_Text">/var/log</text:span>, PIDs in <text:span text:style-name="Source_20_Text">/run</text:span></text:p>
          </table:table-cell>
        </table:table-row>
      </table:table>
      <text:h text:style-name="P5" text:outline-level="3">3.2 Essential Root (/) Subdirectories</text:h>
      <text:list text:style-name="L6">
        <text:list-item>
          <text:p text:style-name="P18"><text:span text:style-name="Source_20_Text"><text:span text:style-name="T1">/bin</text:span></text:span>: Essential user command binaries (e.g., <text:span text:style-name="Source_20_Text">ls</text:span>, <text:span text:style-name="Source_20_Text">cp</text:span>, <text:span text:style-name="Source_20_Text">mount</text:span>).</text:p>
        </text:list-item>
        <text:list-item>
          <text:p text:style-name="P18"><text:span text:style-name="Source_20_Text"><text:span text:style-name="T1">/boot</text:span></text:span>: Static files for the bootloader and the kernel.</text:p>
        </text:list-item>
        <text:list-item>
          <text:p text:style-name="P18"><text:span text:style-name="Source_20_Text"><text:span text:style-name="T1">/etc</text:span></text:span>: Host-specific system configuration. Must not contain binaries.</text:p>
        </text:list-item>
        <text:list-item>
          <text:p text:style-name="P18"><text:span text:style-name="Source_20_Text"><text:span text:style-name="T1">/lib</text:span></text:span>: Shared libraries required by binaries in <text:span text:style-name="Source_20_Text">/bin</text:span> and <text:span text:style-name="Source_20_Text">/sbin</text:span>.</text:p>
        </text:list-item>
        <text:list-item>
          <text:p text:style-name="P19"><text:span text:style-name="Source_20_Text"><text:span text:style-name="T1">/var</text:span></text:span>: Stores variable data, isolating it from static directories like <text:span text:style-name="Source_20_Text">/usr</text:span> so that <text:span text:style-name="Source_20_Text">/usr</text:span> can be mounted as read-only.</text:p>
        </text:list-item>
      </text:list>
      <text:p text:style-name="P2">-------------------------------------------------------------------------------- </text:p>
      <text:h text:style-name="P3" text:outline-level="2">Module 4: Practical Lab Manual – Packet and Log Analysis</text:h>
      <text:p text:style-name="P4">Duration: 1.5 Hours</text:p>
      <text:h text:style-name="P5" text:outline-level="3">Lab Toolset</text:h>
      <text:list text:style-name="L7">
        <text:list-item>
          <text:p text:style-name="P20"><text:span text:style-name="T1">tcpdump:</text:span> A command-line tool for capturing and analyzing network traffic.</text:p>
        </text:list-item>
        <text:list-item>
          <text:p text:style-name="P20"><text:span text:style-name="T1">Wireshark:</text:span> A graphical packet analyzer for deep inspection of encapsulated data.</text:p>
        </text:list-item>
        <text:list-item>
          <text:p text:style-name="P21"><text:soft-page-break/><text:span text:style-name="T1">Zeek:</text:span> A network security monitor that generates high-level logs from traffic.</text:p>
        </text:list-item>
      </text:list>
      <text:h text:style-name="P5" text:outline-level="3">Exercise 1: Capturing DHCP DORA with tcpdump</text:h>
      <text:p text:style-name="P2">Analyze the four-step DHCP encapsulation process (Discover, Offer, Request, Acknowledgement).</text:p>
      <text:list text:style-name="L8">
        <text:list-item>
          <text:p text:style-name="P22">Invoke <text:span text:style-name="Source_20_Text">tcpdump</text:span> in verbose mode to capture local network traffic.</text:p>
        </text:list-item>
        <text:list-item>
          <text:p text:style-name="P22">Filter for DHCP traffic.</text:p>
        </text:list-item>
        <text:list-item>
          <text:p text:style-name="P23">Identify the transaction ID and the encapsulated options within the packet.</text:p>
        </text:list-item>
      </text:list>
      <text:h text:style-name="P5" text:outline-level="3">Exercise 2: Analyzing Connection Flows in Zeek Logs</text:h>
      <text:p text:style-name="P2">Zeek converts raw packets into readable logs.</text:p>
      <text:list text:style-name="L9">
        <text:list-item>
          <text:p text:style-name="P24"><text:span text:style-name="Source_20_Text"><text:span text:style-name="T1">conn.log</text:span></text:span>: Inspect the <text:span text:style-name="Source_20_Text">ip_proto</text:span> field to determine if the traffic is TCP or UDP. Identify the <text:span text:style-name="Source_20_Text">uid</text:span> (unique identifier) used to correlate this flow with other logs.</text:p>
        </text:list-item>
        <text:list-item>
          <text:p text:style-name="P25"><text:span text:style-name="Source_20_Text"><text:span text:style-name="T1">ssl.log</text:span></text:span>: Compare handshakes between TLS 1.2 and TLS 1.3. Look for the version indicators and the presence of <text:span text:style-name="Source_20_Text">HelloRetryRequest</text:span> messages in 1-RTT flows.</text:p>
        </text:list-item>
      </text:list>
      <text:h text:style-name="P5" text:outline-level="3">Exercise 3: Audit Logging and "Who, What, Where, When"</text:h>
      <text:p text:style-name="P2">Using Google Cloud Search or AWS Audit Manager principles:</text:p>
      <text:list text:style-name="L10">
        <text:list-item>
          <text:p text:style-name="P26"><text:span text:style-name="T1">Admin Activity Logs:</text:span> Review operations that modified resource configurations (e.g. <text:span text:style-name="Source_20_Text">datasources.updateSchema</text:span>).</text:p>
        </text:list-item>
        <text:list-item>
          <text:p text:style-name="P26"><text:span text:style-name="T1">Data Access Logs:</text:span> Identify who read or modified specific data items.</text:p>
        </text:list-item>
        <text:list-item>
          <text:p text:style-name="P27"><text:span text:style-name="T1">Filtering:</text:span> Use search filters to isolate <text:span text:style-name="Source_20_Text">cloudsearch.googleapis.com</text:span> service names to view specific audit events.</text:p>
        </text:list-item>
      </text:list>
      <text:p text:style-name="P2">-------------------------------------------------------------------------------- </text:p>
      <text:h text:style-name="P3" text:outline-level="2">Summary of Key Takeaways</text:h>
      <text:list text:style-name="L11">
        <text:list-item>
          <text:p text:style-name="P28"><text:span text:style-name="T1">Socket Mechanics:</text:span> Networking starts with the socket interface, where byte order (Big-Endian) must be respected.</text:p>
        </text:list-item>
        <text:list-item>
          <text:p text:style-name="P28"><text:span text:style-name="T1">Security Encapsulation:</text:span> TLS 1.3 removes legacy RSA key exchanges and streamlines handshakes to improve both security and speed.</text:p>
        </text:list-item>
        <text:list-item>
          <text:p text:style-name="P28"><text:span text:style-name="T1">System Structure:</text:span> The FHS organizes host data into static and variable hierarchies to allow for secure, read-only system components.</text:p>
        </text:list-item>
        <text:list-item>
          <text:p text:style-name="P29"><text:span text:style-name="T1">Visibility:</text:span> Tools like <text:span text:style-name="Source_20_Text">tcpdump</text:span> and <text:span text:style-name="Source_20_Text">Wireshark</text:span> provide a window into the encapsulated headers of the 90-Day Cybersecurity Master Architecture.</text:p>
        </text:list-item>
      </text:lis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21:19:09.407232283</meta:creation-date>
    <dc:date>2026-05-14T21:21:35.008918927</dc:date>
    <meta:editing-duration>PT2M27S</meta:editing-duration>
    <meta:editing-cycles>1</meta:editing-cycles>
    <meta:document-statistic meta:table-count="2" meta:image-count="0" meta:object-count="0" meta:page-count="4" meta:paragraph-count="96" meta:word-count="1067" meta:character-count="7406" meta:non-whitespace-character-count="6463"/>
    <meta:generator>LibreOffice/26.2.3.2$Linux_X86_64 LibreOffice_project/70e089b17412e4cb7773e41413306b17a2328c34</meta:generator>
  </office:meta>
</office:document-meta>
</file>